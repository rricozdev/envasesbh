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Fri Jul 03 16:58:56.094699 2026] [autoindex:error] [pid 3759940:tid 3759993] [client 66.70.198.128:3316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6:56:14.678608 2026] [autoindex:error] [pid 3759943:tid 3760186] [client 66.70.198.128:55808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30:58.627049 2026] [autoindex:error] [pid 3759576:tid 3758214] [client 66.70.198.128:4709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6:25:15.653650 2026] [autoindex:error] [pid 3753082:tid 3753346] [client 66.70.198.128:50994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591785 2026] [autoindex:error] [pid 3753080:tid 3753210] [client 66.70.198.128:50978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590945 2026] [autoindex:error] [pid 3753082:tid 3753330] [client 66.70.198.128:50990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522752 2026] [autoindex:error] [pid 3753083:tid 3753275] [client 66.70.198.128:5097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312670 2026] [autoindex:error] [pid 3753082:tid 3753342] [client 66.70.198.128:5096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<text:soft-page-break/>[Fri Jul 03 16:25:15.149789 2026] [autoindex:error] [pid 3753081:tid 3753327] [client 66.70.198.128:50948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137351 2026] [autoindex:error] [pid 3753083:tid 3753278] [client 66.70.198.128:50928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107649 2026] [autoindex:error] [pid 3753082:tid 3753350] [client 66.70.198.128:50920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5:15.049787 2026] [autoindex:error] [pid 3753083:tid 3753271] [client 66.70.198.128:50904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6:24:53.084496 2026] [autoindex:error] [pid 3753081:tid 3753295] [client 66.70.198.128:38060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6:24:52.893050 2026] [autoindex:error] [pid 3753081:tid 3753290] [client 66.70.198.128:3803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6:24:52.879852 2026] [autoindex:error] [pid 3753083:tid 3753249] [client 66.70.198.128:38024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6:24:52.878619 2026] [autoindex:error] [pid 3753081:tid 3753280] [client 66.70.198.128:3800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<text:soft-page-break/>[Fri Jul 03 16:24:52.878532 2026] [autoindex:error] [pid 3753083:tid 3753247] [client 66.70.198.128:38008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6:24:52.704105 2026] [autoindex:error] [pid 3753081:tid 3753274] [client 66.70.198.128:37984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5:58:39.652945 2026] [autoindex:error] [pid 3757329:tid 3757369] [client 66.70.198.128:50240] AH01276: Cannot serve directory /home/envasesb/public_html/productos/250-ml-ova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5:51:42.027857 2026] [autoindex:error] [pid 3757329:tid 3757362] [client 66.70.198.128:37316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envasesbh.mx/blog/</text:p>
      <text:p text:style-name="Standard">[Fri Jul 03 15:48:14.625652 2026] [autoindex:error] [pid 3756332:tid 3756407] [client 66.70.198.128:57790] AH01276: Cannot serve directory /home/envasesb/public_html/productos/1lt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8:10.299616 2026] [autoindex:error] [pid 3757186:tid 3757226] [client 66.70.198.128:57634] AH01276: Cannot serve directory /home/envasesb/public_html/productos/90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8:06.483237 2026] [autoindex:error] [pid 3757186:tid 3757236] [client 66.70.198.128:57556] AH01276: Cannot serve directory /home/envasesb/public_html/productos/1lt-boston-C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8.255294 2026] [autoindex:error] [pid 3756208:tid 3756237] [client 66.70.198.128:53260] AH01276: Cannot serve directory /home/envasesb/public_html/productos/6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38.255202 2026] [autoindex:error] [pid 3757186:tid 3757236] [client 66.70.198.128:53272] AH01276: Cannot serve directory /home/envasesb/public_html/productos/125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8.102936 2026] [autoindex:error] [pid 3756208:tid 3756257] [client 66.70.198.128:53236] AH01276: Cannot serve directory /home/envasesb/public_html/productos/50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8.086897 2026] [autoindex:error] [pid 3756208:tid 3756245] [client 66.70.198.128:53224] AH01276: Cannot serve directory /home/envasesb/public_html/productos/1lt-boston-C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7.922522 2026] [autoindex:error] [pid 3757186:tid 3757228] [client 66.70.198.128:53200] AH01276: Cannot serve directory /home/envasesb/public_html/productos/1lt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7.921779 2026] [autoindex:error] [pid 3757186:tid 3757231] [client 66.70.198.128:53192] AH01276: Cannot serve directory /home/envasesb/public_html/productos/90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0.888141 2026] [autoindex:error] [pid 3756332:tid 3756410] [client 66.70.198.128:49140] AH01276: Cannot serve directory /home/envasesb/public_html/productos/40-ml-instituciona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0.887548 2026] [autoindex:error] [pid 3757186:tid 3757223] [client 66.70.198.128:49142] AH01276: Cannot serve directory /home/envasesb/public_html/productos/30-ml-invert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0.676506 2026] [autoindex:error] [pid 3756332:tid 3756411] [client 66.70.198.128:49106] AH01276: Cannot serve directory /home/envasesb/public_html/productos/25-ml-lapiz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30.556269 2026] [autoindex:error] [pid 3763139:tid 3763259] [client 66.70.198.128:49078] AH01276: Cannot serve directory /home/envasesb/public_html/productos/bomba-dosificadora-reforzada-azu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0.556040 2026] [autoindex:error] [pid 3756208:tid 3756242] [client 66.70.198.128:49066] AH01276: Cannot serve directory /home/envasesb/public_html/productos/bomba-dosificadora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30.555865 2026] [autoindex:error] [pid 3757186:tid 3757222] [client 66.70.198.128:49092] AH01276: Cannot serve directory /home/envasesb/public_html/productos/tapa-ciega-r1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7.180052 2026] [autoindex:error] [pid 3763139:tid 3763265] [client 66.70.198.128:4901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7.179343 2026] [autoindex:error] [pid 3756208:tid 3756243] [client 66.70.198.128:49004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7.163831 2026] [autoindex:error] [pid 3756208:tid 3756261] [client 66.70.198.128:4899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7.163141 2026] [autoindex:error] [pid 3756208:tid 3756250] [client 66.70.198.128:48980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6.888785 2026] [autoindex:error] [pid 3756332:tid 3756400] [client 66.70.198.128:4896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26.882047 2026] [autoindex:error] [pid 3756332:tid 3756410] [client 66.70.198.128:48950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6.857345 2026] [autoindex:error] [pid 3756332:tid 3756409] [client 66.70.198.128:48934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6.856815 2026] [autoindex:error] [pid 3756332:tid 3756411] [client 66.70.198.128:48946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2.603747 2026] [autoindex:error] [pid 3757186:tid 3757236] [client 66.70.198.128:43032] AH01276: Cannot serve directory /home/envasesb/public_html/productos/30-ml-campan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2.575566 2026] [autoindex:error] [pid 3756332:tid 3756409] [client 66.70.198.128:43020] AH01276: Cannot serve directory /home/envasesb/public_html/productos/50-ml-campan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2.478402 2026] [autoindex:error] [pid 3757186:tid 3757220] [client 66.70.198.128:43002] AH01276: Cannot serve directory /home/envasesb/public_html/productos/30-ml-cilindric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2.386560 2026] [autoindex:error] [pid 3756208:tid 3756251] [client 66.70.198.128:42978] AH01276: Cannot serve directory /home/envasesb/public_html/productos/40-ml-cilindric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22.196041 2026] [autoindex:error] [pid 3756208:tid 3756259] [client 66.70.198.128:42936] AH01276: Cannot serve directory /home/envasesb/public_html/productos/40-ml-farm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22.195842 2026] [autoindex:error] [pid 3757186:tid 3757223] [client 66.70.198.128:42934] AH01276: Cannot serve directory /home/envasesb/public_html/productos/30-ml-instituciona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6.568315 2026] [autoindex:error] [pid 3757186:tid 3757226] [client 66.70.198.128:42762] AH01276: Cannot serve directory /home/envasesb/public_html/productos/355-ml-romb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6.512838 2026] [autoindex:error] [pid 3757186:tid 3757218] [client 66.70.198.128:42758] AH01276: Cannot serve directory /home/envasesb/public_html/productos/180-ml-sals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6.434367 2026] [autoindex:error] [pid 3757186:tid 3757232] [client 66.70.198.128:42742] AH01276: Cannot serve directory /home/envasesb/public_html/productos/sq-25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6.364155 2026] [autoindex:error] [pid 3757186:tid 3757237] [client 66.70.198.128:42726] AH01276: Cannot serve directory /home/envasesb/public_html/productos/sq-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6.270160 2026] [autoindex:error] [pid 3757186:tid 3757235] [client 66.70.198.128:42698] AH01276: Cannot serve directory /home/envasesb/public_html/productos/355-ml-toco-barrili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6.180607 2026] [autoindex:error] [pid 3763139:tid 3763252] [client 66.70.198.128:56512] AH01276: Cannot serve directory /home/envasesb/public_html/productos/250-ml-twist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5.291252 2026] [autoindex:error] [pid 3763139:tid 3763257] [client 66.70.198.128:5649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15.191903 2026] [autoindex:error] [pid 3757186:tid 3757220] [client 66.70.198.128:56468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5.050779 2026] [autoindex:error] [pid 3763139:tid 3763261] [client 66.70.198.128:56466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10.037467 2026] [autoindex:error] [pid 3757186:tid 3757231] [client 66.70.198.128:56138] AH01276: Cannot serve directory /home/envasesb/public_html/productos/50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9.954398 2026] [autoindex:error] [pid 3763139:tid 3763248] [client 66.70.198.128:56112] AH01276: Cannot serve directory /home/envasesb/public_html/productos/100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9.891759 2026] [autoindex:error] [pid 3763139:tid 3763247] [client 66.70.198.128:56092] AH01276: Cannot serve directory /home/envasesb/public_html/productos/45-ml-oliva-cuadra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9.818835 2026] [autoindex:error] [pid 3757186:tid 3757222] [client 66.70.198.128:56080] AH01276: Cannot serve directory /home/envasesb/public_html/productos/250-ml-oliva-cuadra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9.693832 2026] [autoindex:error] [pid 3757186:tid 3757220] [client 66.70.198.128:56072] AH01276: Cannot serve directory /home/envasesb/public_html/productos/750-ml-oliva-cuadra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9.642132 2026] [autoindex:error] [pid 3756208:tid 3756249] [client 66.70.198.128:56032] AH01276: Cannot serve directory /home/envasesb/public_html/productos/1-lt-pin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04.315355 2026] [autoindex:error] [pid 3757186:tid 3757228] [client 66.70.198.128:38022] AH01276: Cannot serve directory /home/envasesb/public_html/productos/1000-ml-agr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4.231640 2026] [autoindex:error] [pid 3756332:tid 3756392] [client 66.70.198.128:38020] AH01276: Cannot serve directory /home/envasesb/public_html/productos/355-ml-bal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4.130804 2026] [autoindex:error] [pid 3757186:tid 3757218] [client 66.70.198.128:38000] AH01276: Cannot serve directory /home/envasesb/public_html/productos/355-ml-jubil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4.056527 2026] [autoindex:error] [pid 3757186:tid 3757237] [client 66.70.198.128:37976] AH01276: Cannot serve directory /home/envasesb/public_html/productos/500-ml-jubil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3.949925 2026] [autoindex:error] [pid 3757186:tid 3757225] [client 66.70.198.128:37954] AH01276: Cannot serve directory /home/envasesb/public_html/productos/25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3.827906 2026] [autoindex:error] [pid 3757186:tid 3757222] [client 66.70.198.128:37944] AH01276: Cannot serve directory /home/envasesb/public_html/productos/355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2.519219 2026] [autoindex:error] [pid 3757186:tid 3757231] [client 66.70.198.128:37838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2.452233 2026] [autoindex:error] [pid 3756208:tid 3756239] [client 66.70.198.128:3783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7:02.347909 2026] [autoindex:error] [pid 3756208:tid 3756255] [client 66.70.198.128:37820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0.863439 2026] [autoindex:error] [pid 3763139:tid 3763248] [client 66.70.198.128:37724] AH01276: Cannot serve directory /home/envasesb/public_html/productos/1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7:00.180685 2026] [autoindex:error] [pid 3757186:tid 3757221] [client 66.70.198.128:37680] AH01276: Cannot serve directory /home/envasesb/public_html/productos/10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9.560976 2026] [autoindex:error] [pid 3756208:tid 3756242] [client 66.70.198.128:37590] AH01276: Cannot serve directory /home/envasesb/public_html/productos/6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9.313731 2026] [autoindex:error] [pid 3757186:tid 3757219] [client 66.70.198.128:37560] AH01276: Cannot serve directory /home/envasesb/public_html/productos/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7.672236 2026] [autoindex:error] [pid 3756332:tid 3756413] [client 66.70.198.128:37342] AH01276: Cannot serve directory /home/envasesb/public_html/productos/355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7.672236 2026] [autoindex:error] [pid 3757186:tid 3757221] [client 66.70.198.128:37336] AH01276: Cannot serve directory /home/envasesb/public_html/productos/25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7.418979 2026] [autoindex:error] [pid 3757186:tid 3757232] [client 66.70.198.128:37296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5:46:57.418764 2026] [autoindex:error] [pid 3756208:tid 3756241] [client 66.70.198.128:37294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7.418486 2026] [autoindex:error] [pid 3756332:tid 3756400] [client 66.70.198.128:3729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57.411615 2026] [autoindex:error] [pid 3756332:tid 3756410] [client 66.70.198.128:37286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5:46:47.347093 2026] [autoindex:error] [pid 3757186:tid 3757237] [client 66.70.198.128:5016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5:46:46.851927 2026] [autoindex:error] [pid 3756208:tid 3756246] [client 66.70.198.128:5014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5:19:48.579186 2026] [autoindex:error] [pid 3763139:tid 3763261] [client 66.70.198.128:53010] AH01276: Cannot serve directory /home/envasesb/public_html/productos/trigger-sprayer-rosca-2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4:45:27.308767 2026] [autoindex:error] [pid 3763142:tid 3763398] [client 66.70.198.128:49670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4.025263 2026] [autoindex:error] [pid 3756341:tid 3756378] [client 66.70.198.128:58592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<text:soft-page-break/>generated directory index forbidden by Options directive, referer: https://www.envasesbh.mx/productos/tapa-disk-top-r24410</text:p>
      <text:p text:style-name="Standard">[Fri Jul 03 14:45:14.024881 2026] [autoindex:error] [pid 3763142:tid 3763364] [client 66.70.198.128:58578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4.024560 2026] [autoindex:error] [pid 3763142:tid 3763368] [client 66.70.198.128:58564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4.024308 2026] [autoindex:error] [pid 3763139:tid 3763252] [client 66.70.198.128:58548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3.730186 2026] [autoindex:error] [pid 3756341:tid 3756382] [client 66.70.198.128:58534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3.729919 2026] [autoindex:error] [pid 3763142:tid 3763377] [client 66.70.198.128:58530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3.729590 2026] [autoindex:error] [pid 3756341:tid 3756383] [client 66.70.198.128:5852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13.729266 2026] [autoindex:error] [pid 3763139:tid 3763278] [client 66.70.198.128:58520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<text:soft-page-break/>generated directory index forbidden by Options directive, referer: https://www.envasesbh.mx/productos/tapa-disk-top-r24410</text:p>
      <text:p text:style-name="Standard">[Fri Jul 03 14:45:07.095560 2026] [autoindex:error] [pid 3763142:tid 3763401] [client 66.70.198.128:58146] AH01276: Cannot serve directory /home/envasesb/public_html/productos/trigger-sprayer-rosca-2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7.089882 2026] [autoindex:error] [pid 3763142:tid 3763400] [client 66.70.198.128:58142] AH01276: Cannot serve directory /home/envasesb/public_html/productos/trigger-industrial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7.084449 2026] [autoindex:error] [pid 3763142:tid 3763379] [client 66.70.198.128:58130] AH01276: Cannot serve directory /home/envasesb/public_html/productos/trigger-cola-de-pato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5.848186 2026] [autoindex:error] [pid 3763139:tid 3763272] [client 66.70.198.128:56220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5.611508 2026] [autoindex:error] [pid 3763142:tid 3763361] [client 66.70.198.128:5620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5.611381 2026] [autoindex:error] [pid 3763142:tid 3763390] [client 66.70.198.128:56188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5.610672 2026] [autoindex:error] [pid 3763142:tid 3763399] [client 66.70.198.128:56208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<text:soft-page-break/>generated directory index forbidden by Options directive, referer: https://www.envasesbh.mx/productos/tapa-disk-top-r24410</text:p>
      <text:p text:style-name="Standard">[Fri Jul 03 14:45:05.610629 2026] [autoindex:error] [pid 3763139:tid 3763274] [client 66.70.198.128:5620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tapa-disk-top-r24410</text:p>
      <text:p text:style-name="Standard">[Fri Jul 03 14:45:03.547230 2026] [autoindex:error] [pid 3756341:tid 3756368] [client 66.70.198.128:56080] AH01276: Cannot serve directory /home/envasesb/public_html/productos/bomba-dosificadora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5:03.544252 2026] [autoindex:error] [pid 3756341:tid 3756371] [client 66.70.198.128:56072] AH01276: Cannot serve directory /home/envasesb/public_html/productos/bomba-dosificadora-reforzada-azu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5:03.543939 2026] [autoindex:error] [pid 3763142:tid 3763391] [client 66.70.198.128:56066] AH01276: Cannot serve directory /home/envasesb/public_html/productos/tapa-cintillo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9.555085 2026] [autoindex:error] [pid 3763142:tid 3763379] [client 66.70.198.128:55832] AH01276: Cannot serve directory /home/envasesb/public_html/productos/tapa-vitrolero-1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9.541212 2026] [autoindex:error] [pid 3763139:tid 3763271] [client 66.70.198.128:55816] AH01276: Cannot serve directory /home/envasesb/public_html/productos/atomizador-boton-rosca-1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9.540388 2026] [autoindex:error] [pid 3756341:tid 3756376] [client 66.70.198.128:55808] AH01276: Cannot serve directory /home/envasesb/public_html/productos/atomizador-boton-rosca-20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8.740168 2026] [autoindex:error] [pid 3763142:tid 3763375] [client 66.70.198.128:55660] AH01276: Cannot serve directory /home/envasesb/public_html/productos/flip-top-28410/: No matching DirectoryIndex <text:soft-page-break/>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8.739525 2026] [autoindex:error] [pid 3763140:tid 3763352] [client 66.70.198.128:55654] AH01276: Cannot serve directory /home/envasesb/public_html/productos/tapa-sport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8.739525 2026] [autoindex:error] [pid 3756341:tid 3756382] [client 66.70.198.128:55672] AH01276: Cannot serve directory /home/envasesb/public_html/productos/flip-top-24415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8.453281 2026] [autoindex:error] [pid 3763140:tid 3763350] [client 66.70.198.128:55644] AH01276: Cannot serve directory /home/envasesb/public_html/productos/tapa-disk-top-r24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8.452580 2026] [autoindex:error] [pid 3756341:tid 3756383] [client 66.70.198.128:55640] AH01276: Cannot serve directory /home/envasesb/public_html/productos/tapa-disk-top-24415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58.452552 2026] [autoindex:error] [pid 3763142:tid 3763369] [client 66.70.198.128:55626] AH01276: Cannot serve directory /home/envasesb/public_html/productos/flip-top-24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5.725516 2026] [autoindex:error] [pid 3763142:tid 3763377] [client 66.70.198.128:39692] AH01276: Cannot serve directory /home/envasesb/public_html/productos/bomba-dosificadora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5.725318 2026] [autoindex:error] [pid 3763142:tid 3763401] [client 66.70.198.128:39682] AH01276: Cannot serve directory /home/envasesb/public_html/productos/bomba-dosificadora-reforzada-azu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5.488570 2026] [autoindex:error] [pid 3763142:tid 3763395] [client 66.70.198.128:39654] AH01276: Cannot serve directory /home/envasesb/public_html/productos/tapa-disk-top-r24410/: No matching DirectoryIndex <text:soft-page-break/>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5.488400 2026] [autoindex:error] [pid 3763142:tid 3763369] [client 66.70.198.128:39650] AH01276: Cannot serve directory /home/envasesb/public_html/productos/tapa-disk-top-24415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5.487893 2026] [autoindex:error] [pid 3763142:tid 3763400] [client 66.70.198.128:39668] AH01276: Cannot serve directory /home/envasesb/public_html/productos/tapa-cintillo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5.487777 2026] [autoindex:error] [pid 3763142:tid 3763375] [client 66.70.198.128:39638] AH01276: Cannot serve directory /home/envasesb/public_html/productos/flip-top-24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4.303775 2026] [autoindex:error] [pid 3763142:tid 3763398] [client 66.70.198.128:39578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3.298262 2026] [autoindex:error] [pid 3756341:tid 3756371] [client 66.70.198.128:39516] AH01276: Cannot serve directory /home/envasesb/public_html/productos/atomizador-boton-rosca-24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3.078697 2026] [autoindex:error] [pid 3756341:tid 3756391] [client 66.70.198.128:39474] AH01276: Cannot serve directory /home/envasesb/public_html/productos/trigger-industrial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3.078111 2026] [autoindex:error] [pid 3756341:tid 3756372] [client 66.70.198.128:39460] AH01276: Cannot serve directory /home/envasesb/public_html/productos/mini-trigger-rosca-24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3.078071 2026] [autoindex:error] [pid 3763142:tid 3763384] [client 66.70.198.128:39484] AH01276: Cannot serve directory /home/envasesb/public_html/productos/trigger-cola-de-pato-rosca-28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4:33.077851 2026] [autoindex:error] [pid 3756341:tid 3756370] [client 66.70.198.128:39450] AH01276: Cannot serve directory /home/envasesb/public_html/productos/trigger-sprayer-rosca-2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2.190605 2026] [autoindex:error] [pid 3763139:tid 3763276] [client 66.70.198.128:39316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2.190376 2026] [autoindex:error] [pid 3756341:tid 3756368] [client 66.70.198.128:39308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2.189966 2026] [autoindex:error] [pid 3756341:tid 3756393] [client 66.70.198.128:3932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1.983602 2026] [autoindex:error] [pid 3756341:tid 3756378] [client 66.70.198.128:39288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1.959865 2026] [autoindex:error] [pid 3756341:tid 3756369] [client 66.70.198.128:39286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1.959607 2026] [autoindex:error] [pid 3756341:tid 3756382] [client 66.70.198.128:3927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1.959389 2026] [autoindex:error] [pid 3763139:tid 3763274] [client 66.70.198.128:39262] AH01276: Cannot serve directory /home/envasesb/public_html/productos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4:31.055090 2026] [autoindex:error] [pid 3763139:tid 3763259] [client 66.70.198.128:39214] AH01276: Cannot serve directory /home/envasesb/public_html/productos/flip-top-2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0.044418 2026] [autoindex:error] [pid 3763139:tid 3763248] [client 66.70.198.128:39170] AH01276: Cannot serve directory /home/envasesb/public_html/productos/atomizador-boton-rosca-1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0.044107 2026] [autoindex:error] [pid 3756341:tid 3756395] [client 66.70.198.128:39166] AH01276: Cannot serve directory /home/envasesb/public_html/productos/atomizador-boton-rosca-20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30.043660 2026] [autoindex:error] [pid 3756341:tid 3756381] [client 66.70.198.128:39174] AH01276: Cannot serve directory /home/envasesb/public_html/productos/tapa-vitrolero-1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2.726000 2026] [autoindex:error] [pid 3756341:tid 3756380] [client 66.70.198.128:39556] AH01276: Cannot serve directory /home/envasesb/public_html/productos/bomba-dosificadora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2.725677 2026] [autoindex:error] [pid 3756341:tid 3756374] [client 66.70.198.128:39540] AH01276: Cannot serve directory /home/envasesb/public_html/productos/bomba-dosificadora-reforzada-azu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2.725412 2026] [autoindex:error] [pid 3763140:tid 3763380] [client 66.70.198.128:39526] AH01276: Cannot serve directory /home/envasesb/public_html/productos/tapa-cintillo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963339 2026] [autoindex:error] [pid 3763139:tid 3763258] [client 66.70.198.128:39438] AH01276: Cannot serve directory /home/envasesb/public_html/productos/tapa-disk-top-r24410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4:20.960052 2026] [autoindex:error] [pid 3763140:tid 3763356] [client 66.70.198.128:39424] AH01276: Cannot serve directory /home/envasesb/public_html/productos/tapa-disk-top-24415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958854 2026] [autoindex:error] [pid 3763139:tid 3763246] [client 66.70.198.128:39414] AH01276: Cannot serve directory /home/envasesb/public_html/productos/flip-top-24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278290 2026] [autoindex:error] [pid 3756341:tid 3756374] [client 66.70.198.128:39392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277585 2026] [autoindex:error] [pid 3763142:tid 3763375] [client 66.70.198.128:39390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267878 2026] [autoindex:error] [pid 3763142:tid 3763376] [client 66.70.198.128:3937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122002 2026] [autoindex:error] [pid 3763142:tid 3763357] [client 66.70.198.128:39346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047465 2026] [autoindex:error] [pid 3763142:tid 3763388] [client 66.70.198.128:39336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20.046866 2026] [autoindex:error] [pid 3756341:tid 3756383] [client 66.70.198.128:39328] AH01276: Cannot serve directory /home/envasesb/public_html/productos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4:20.042252 2026] [autoindex:error] [pid 3756341:tid 3756375] [client 66.70.198.128:3931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19.007420 2026] [autoindex:error] [pid 3756341:tid 3756383] [client 66.70.198.128:39222] AH01276: Cannot serve directory /home/envasesb/public_html/productos/tapa-vitrolero-1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19.007161 2026] [autoindex:error] [pid 3756341:tid 3756375] [client 66.70.198.128:39210] AH01276: Cannot serve directory /home/envasesb/public_html/productos/atomizador-boton-rosca-1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19.006927 2026] [autoindex:error] [pid 3756341:tid 3756385] [client 66.70.198.128:39204] AH01276: Cannot serve directory /home/envasesb/public_html/productos/atomizador-boton-rosca-20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7.833707 2026] [autoindex:error] [pid 3763139:tid 3763256] [client 66.70.198.128:59336] AH01276: Cannot serve directory /home/envasesb/public_html/productos/atomizador-boton-rosca-18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7.833643 2026] [autoindex:error] [pid 3756341:tid 3756369] [client 66.70.198.128:59330] AH01276: Cannot serve directory /home/envasesb/public_html/productos/tapa-vitrolero-1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7.833559 2026] [autoindex:error] [pid 3756341:tid 3756386] [client 66.70.198.128:59316] AH01276: Cannot serve directory /home/envasesb/public_html/productos/atomizador-boton-rosca-20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7.147490 2026] [autoindex:error] [pid 3763139:tid 3763262] [client 66.70.198.128:59254] AH01276: Cannot serve directory /home/envasesb/public_html/productos/flip-top-28410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4:07.147354 2026] [autoindex:error] [pid 3756341:tid 3756391] [client 66.70.198.128:59246] AH01276: Cannot serve directory /home/envasesb/public_html/productos/tapa-sport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7.146571 2026] [autoindex:error] [pid 3756341:tid 3756371] [client 66.70.198.128:59264] AH01276: Cannot serve directory /home/envasesb/public_html/productos/flip-top-24415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6.106787 2026] [autoindex:error] [pid 3763139:tid 3763252] [client 66.70.198.128:51334] AH01276: Cannot serve directory /home/envasesb/public_html/productos/bomba-dosificadora-reforzada-azu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6.106275 2026] [autoindex:error] [pid 3763139:tid 3763246] [client 66.70.198.128:51348] AH01276: Cannot serve directory /home/envasesb/public_html/productos/bomba-dosificadora-rosca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5.990249 2026] [autoindex:error] [pid 3763140:tid 3763371] [client 66.70.198.128:51290] AH01276: Cannot serve directory /home/envasesb/public_html/productos/tapa-cintillo-28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5.862311 2026] [autoindex:error] [pid 3763142:tid 3763357] [client 66.70.198.128:51268] AH01276: Cannot serve directory /home/envasesb/public_html/productos/tapa-disk-top-24415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5.861676 2026] [autoindex:error] [pid 3763139:tid 3763266] [client 66.70.198.128:51260] AH01276: Cannot serve directory /home/envasesb/public_html/productos/tapa-disk-top-r244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5.861425 2026] [autoindex:error] [pid 3763142:tid 3763388] [client 66.70.198.128:51252] AH01276: Cannot serve directory /home/envasesb/public_html/productos/flip-top-24410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4:01.389032 2026] [autoindex:error] [pid 3763140:tid 3763356] [client 66.70.198.128:50732] AH01276: Cannot serve directory /home/envasesb/public_html/productos/25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1.388941 2026] [autoindex:error] [pid 3763139:tid 3763258] [client 66.70.198.128:50726] AH01276: Cannot serve directory /home/envasesb/public_html/productos/250-ml-boston-r24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0.441845 2026] [autoindex:error] [pid 3756341:tid 3756376] [client 66.70.198.128:50646] AH01276: Cannot serve directory /home/envasesb/public_html/productos/50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0.441761 2026] [autoindex:error] [pid 3756341:tid 3756389] [client 66.70.198.128:50630] AH01276: Cannot serve directory /home/envasesb/public_html/productos/1lt-boston-C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0.441603 2026] [autoindex:error] [pid 3763142:tid 3763368] [client 66.70.198.128:50626] AH01276: Cannot serve directory /home/envasesb/public_html/productos/6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4:00.440876 2026] [autoindex:error] [pid 3763142:tid 3763391] [client 66.70.198.128:50618] AH01276: Cannot serve directory /home/envasesb/public_html/productos/125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782899 2026] [autoindex:error] [pid 3763140:tid 3763355] [client 66.70.198.128:50262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782556 2026] [autoindex:error] [pid 3763142:tid 3763377] [client 66.70.198.128:50244] AH01276: Cannot serve directory /home/envasesb/public_html/productos/1000-ml-agro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3:56.782316 2026] [autoindex:error] [pid 3756341:tid 3756378] [client 66.70.198.128:50248] AH01276: Cannot serve directory /home/envasesb/public_html/productos/10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553849 2026] [autoindex:error] [pid 3763139:tid 3763265] [client 66.70.198.128:50222] AH01276: Cannot serve directory /home/envasesb/public_html/productos/50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553483 2026] [autoindex:error] [pid 3756341:tid 3756369] [client 66.70.198.128:50216] AH01276: Cannot serve directory /home/envasesb/public_html/productos/100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553172 2026] [autoindex:error] [pid 3763140:tid 3763371] [client 66.70.198.128:50212] AH01276: Cannot serve directory /home/envasesb/public_html/productos/1-lt-pin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552705 2026] [autoindex:error] [pid 3756341:tid 3756395] [client 66.70.198.128:50206] AH01276: Cannot serve directory /home/envasesb/public_html/productos/90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317282 2026] [autoindex:error] [pid 3763140:tid 3763362] [client 66.70.198.128:5015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316903 2026] [autoindex:error] [pid 3763139:tid 3763258] [client 66.70.198.128:50166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6.316531 2026] [autoindex:error] [pid 3756341:tid 3756376] [client 66.70.198.128:50162] AH01276: Cannot serve directory /home/envasesb/public_html/proyectos-a-tu-medida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productos</text:p>
      <text:p text:style-name="Standard">[Fri Jul 03 14:43:56.313648 2026] [autoindex:error] [pid 3763140:tid 3763356] [client 66.70.198.128:50144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3:55.593754 2026] [autoindex:error] [pid 3756341:tid 3756395] [client 66.70.198.128:34916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3:55.593665 2026] [autoindex:error] [pid 3756341:tid 3756370] [client 66.70.198.128:3490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3:55.593377 2026] [autoindex:error] [pid 3763142:tid 3763375] [client 66.70.198.128:34900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43.222482 2026] [autoindex:error] [pid 3763140:tid 3763365] [client 66.70.198.128:3329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43.212068 2026] [autoindex:error] [pid 3756341:tid 3756395] [client 66.70.198.128:33290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43.018163 2026] [autoindex:error] [pid 3756341:tid 3756392] [client 66.70.198.128:33264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<text:soft-page-break/>generated directory index forbidden by Options directive, referer: https://www.envasesbh.mx/productos/1lt-boston</text:p>
      <text:p text:style-name="Standard">[Fri Jul 03 14:42:43.017368 2026] [autoindex:error] [pid 3763140:tid 3763396] [client 66.70.198.128:33258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42.978878 2026] [autoindex:error] [pid 3763140:tid 3763393] [client 66.70.198.128:3320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42.978724 2026] [autoindex:error] [pid 3756341:tid 3756372] [client 66.70.198.128:33220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4.577038 2026] [autoindex:error] [pid 3756341:tid 3756383] [client 66.70.198.128:55878] AH01276: Cannot serve directory /home/envasesb/public_html/productos/25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4.577033 2026] [autoindex:error] [pid 3756341:tid 3756370] [client 66.70.198.128:55886] AH01276: Cannot serve directory /home/envasesb/public_html/productos/6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4.576619 2026] [autoindex:error] [pid 3763139:tid 3763257] [client 66.70.198.128:55864] AH01276: Cannot serve directory /home/envasesb/public_html/productos/250-ml-boston-r24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4.571407 2026] [autoindex:error] [pid 3763139:tid 3763258] [client 66.70.198.128:55858] AH01276: Cannot serve directory /home/envasesb/public_html/productos/125-ml-boston/: No matching DirectoryIndex (index.php,index.php8,index.php7,index.php5,index.perl,index.pl,index.plx,index.ppl,index.cgi,index.jsp,index.jp,index.phtml,index.shtml,index.xhtml,index.html,index.htm,index.js) found, and server-<text:soft-page-break/>generated directory index forbidden by Options directive, referer: https://www.envasesbh.mx/productos/1lt-boston</text:p>
      <text:p text:style-name="Standard">[Fri Jul 03 14:42:33.801491 2026] [autoindex:error] [pid 3756341:tid 3756368] [client 66.70.198.128:55774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3.566905 2026] [autoindex:error] [pid 3763142:tid 3763395] [client 66.70.198.128:55752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3.566699 2026] [autoindex:error] [pid 3763142:tid 3763391] [client 66.70.198.128:5574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3.566086 2026] [autoindex:error] [pid 3763140:tid 3763373] [client 66.70.198.128:55736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33.565890 2026] [autoindex:error] [pid 3756341:tid 3756373] [client 66.70.198.128:55760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1lt-boston</text:p>
      <text:p text:style-name="Standard">[Fri Jul 03 14:42:27.099161 2026] [autoindex:error] [pid 3763142:tid 3763369] [client 66.70.198.128:55218] AH01276: Cannot serve directory /home/envasesb/public_html/productos/pet-cilindro-1lt-bal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27.098897 2026] [autoindex:error] [pid 3763140:tid 3763355] [client 66.70.198.128:55202] AH01276: Cannot serve directory /home/envasesb/public_html/productos/cilindro-1-lt-bal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2:27.098492 2026] [autoindex:error] [pid 3763140:tid 3763352] [client 66.70.198.128:55226] AH01276: Cannot serve directory /home/envasesb/public_html/productos/1000ml-generic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24.092826 2026] [autoindex:error] [pid 3763142:tid 3763361] [client 66.70.198.128:40898] AH01276: Cannot serve directory /home/envasesb/public_html/productos/1000ml-agr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24.089707 2026] [autoindex:error] [pid 3763142:tid 3763364] [client 66.70.198.128:40888] AH01276: Cannot serve directory /home/envasesb/public_html/productos/900ml-generica-lavatraste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23.253257 2026] [autoindex:error] [pid 3763140:tid 3763353] [client 66.70.198.128:40762] AH01276: Cannot serve directory /home/envasesb/public_html/productos/1-lt-pin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23.253054 2026] [autoindex:error] [pid 3763140:tid 3763360] [client 66.70.198.128:40740] AH01276: Cannot serve directory /home/envasesb/public_html/productos/900-ml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23.252407 2026] [autoindex:error] [pid 3763140:tid 3763385] [client 66.70.198.128:40746] AH01276: Cannot serve directory /home/envasesb/public_html/productos/1lt-boston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16.294199 2026] [autoindex:error] [pid 3763142:tid 3763384] [client 66.70.198.128:40264] AH01276: Cannot serve directory /home/envasesb/public_html/productos/50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16.293038 2026] [autoindex:error] [pid 3756341:tid 3756380] [client 66.70.198.128:40252] AH01276: Cannot serve directory /home/envasesb/public_html/productos/100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2:16.292173 2026] [autoindex:error] [pid 3756341:tid 3756391] [client 66.70.198.128:40216] AH01276: Cannot serve directory /home/envasesb/public_html/productos/750-ml-oliva-cuadra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16.176817 2026] [autoindex:error] [pid 3756341:tid 3756393] [client 66.70.198.128:43590] AH01276: Cannot serve directory /home/envasesb/public_html/productos/1000-ml-agr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7.167689 2026] [autoindex:error] [pid 3763142:tid 3763357] [client 66.70.198.128:43078] AH01276: Cannot serve directory /home/envasesb/public_html/productos/25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7.167310 2026] [autoindex:error] [pid 3763142:tid 3763398] [client 66.70.198.128:43072] AH01276: Cannot serve directory /home/envasesb/public_html/productos/355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7.167168 2026] [autoindex:error] [pid 3763140:tid 3763392] [client 66.70.198.128:43056] AH01276: Cannot serve directory /home/envasesb/public_html/productos/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889861 2026] [autoindex:error] [pid 3763142:tid 3763382] [client 66.70.198.128:43026] AH01276: Cannot serve directory /home/envasesb/public_html/productos/6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889448 2026] [autoindex:error] [pid 3756341:tid 3756373] [client 66.70.198.128:43018] AH01276: Cannot serve directory /home/envasesb/public_html/productos/1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888787 2026] [autoindex:error] [pid 3756341:tid 3756396] [client 66.70.198.128:43024] AH01276: Cannot serve directory /home/envasesb/public_html/productos/10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2:06.474394 2026] [autoindex:error] [pid 3763139:tid 3763249] [client 66.70.198.128:42978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421940 2026] [autoindex:error] [pid 3763139:tid 3763257] [client 66.70.198.128:42976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421874 2026] [autoindex:error] [pid 3763140:tid 3763356] [client 66.70.198.128:42960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240088 2026] [autoindex:error] [pid 3756341:tid 3756382] [client 66.70.198.128:4294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239336 2026] [autoindex:error] [pid 3763140:tid 3763387] [client 66.70.198.128:42926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170189 2026] [autoindex:error] [pid 3763140:tid 3763362] [client 66.70.198.128:34446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6.169931 2026] [autoindex:error] [pid 3763139:tid 3763258] [client 66.70.198.128:34438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3.995344 2026] [autoindex:error] [pid 3763142:tid 3763369] [client 66.70.198.128:34304] AH01276: Cannot serve directory /home/envasesb/public_html/productos/250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2:03.995200 2026] [autoindex:error] [pid 3763139:tid 3763251] [client 66.70.198.128:34308] AH01276: Cannot serve directory /home/envasesb/public_html/productos/500-ml-jubil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2:03.994530 2026] [autoindex:error] [pid 3763142:tid 3763359] [client 66.70.198.128:34290] AH01276: Cannot serve directory /home/envasesb/public_html/productos/355-ml-licorer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57.937614 2026] [autoindex:error] [pid 3756341:tid 3756395] [client 66.70.198.128:33916] AH01276: Cannot serve directory /home/envasesb/public_html/productos/1000-ml-agr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57.936729 2026] [autoindex:error] [pid 3763139:tid 3763248] [client 66.70.198.128:33910] AH01276: Cannot serve directory /home/envasesb/public_html/productos/355-ml-bal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57.926894 2026] [autoindex:error] [pid 3763139:tid 3763256] [client 66.70.198.128:33894] AH01276: Cannot serve directory /home/envasesb/public_html/productos/355-ml-jubil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53.863881 2026] [autoindex:error] [pid 3756341:tid 3756383] [client 66.70.198.128:53286] AH01276: Cannot serve directory /home/envasesb/public_html/productos/1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52.342942 2026] [autoindex:error] [pid 3763140:tid 3763358] [client 66.70.198.128:53214] AH01276: Cannot serve directory /home/envasesb/public_html/productos/10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9.547773 2026] [autoindex:error] [pid 3763139:tid 3763255] [client 66.70.198.128:56726] AH01276: Cannot serve directory /home/envasesb/public_html/productos/1000-ml-agr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1:39.547126 2026] [autoindex:error] [pid 3763142:tid 3763386] [client 66.70.198.128:56736] AH01276: Cannot serve directory /home/envasesb/public_html/productos/355-ml-jubil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9.547028 2026] [autoindex:error] [pid 3763142:tid 3763388] [client 66.70.198.128:56724] AH01276: Cannot serve directory /home/envasesb/public_html/productos/355-ml-bal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807956 2026] [autoindex:error] [pid 3756341:tid 3756378] [client 66.70.198.128:56560] AH01276: Cannot serve directory /home/envasesb/public_html/productos/25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786443 2026] [autoindex:error] [pid 3756341:tid 3756375] [client 66.70.198.128:56554] AH01276: Cannot serve directory /home/envasesb/public_html/productos/355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559077 2026] [autoindex:error] [pid 3763140:tid 3763393] [client 66.70.198.128:56460] AH01276: Cannot serve directory /home/envasesb/public_html/productos/10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558859 2026] [autoindex:error] [pid 3756341:tid 3756384] [client 66.70.198.128:56466] AH01276: Cannot serve directory /home/envasesb/public_html/productos/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558409 2026] [autoindex:error] [pid 3756341:tid 3756381] [client 66.70.198.128:56490] AH01276: Cannot serve directory /home/envasesb/public_html/productos/6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557730 2026] [autoindex:error] [pid 3756341:tid 3756382] [client 66.70.198.128:56454] AH01276: Cannot serve directory /home/envasesb/public_html/productos/1500-ml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1:37.283442 2026] [autoindex:error] [pid 3756341:tid 3756370] [client 66.70.198.128:56360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282962 2026] [autoindex:error] [pid 3756341:tid 3756371] [client 66.70.198.128:5635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282242 2026] [autoindex:error] [pid 3763142:tid 3763364] [client 66.70.198.128:56370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264926 2026] [autoindex:error] [pid 3756341:tid 3756378] [client 66.70.198.128:56324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048749 2026] [autoindex:error] [pid 3763142:tid 3763369] [client 66.70.198.128:56220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048249 2026] [autoindex:error] [pid 3763140:tid 3763353] [client 66.70.198.128:5620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035991 2026] [autoindex:error] [pid 3763140:tid 3763351] [client 66.70.198.128:56194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[Fri Jul 03 14:41:37.035906 2026] [autoindex:error] [pid 3763142:tid 3763366] [client 66.70.198.128:5618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</text:p>
      <text:p text:style-name="Standard"><text:soft-page-break/>[Fri Jul 03 14:41:36.650232 2026] [autoindex:error] [pid 3756341:tid 3756396] [client 66.70.198.128:56104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23.010893 2026] [autoindex:error] [pid 3756341:tid 3756396] [client 66.70.198.128:36730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23.010725 2026] [autoindex:error] [pid 3763140:tid 3763365] [client 66.70.198.128:36742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05.705815 2026] [autoindex:error] [pid 3756341:tid 3756390] [client 66.70.198.128:33840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05.698383 2026] [autoindex:error] [pid 3756341:tid 3756396] [client 66.70.198.128:33828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05.482078 2026] [autoindex:error] [pid 3763139:tid 3763265] [client 66.70.198.128:33764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05.481730 2026] [autoindex:error] [pid 3763142:tid 3763376] [client 66.70.198.128:33758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41:05.481400 2026] [autoindex:error] [pid 3756341:tid 3756375] [client 66.70.198.128:33742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<text:soft-page-break/>[Fri Jul 03 14:41:05.472862 2026] [autoindex:error] [pid 3756341:tid 3756389] [client 66.70.198.128:33734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38:27.390068 2026] [autoindex:error] [pid 3763140:tid 3763352] [client 66.70.198.128:50862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32:56.193619 2026] [autoindex:error] [pid 3763142:tid 3763399] [client 66.70.198.128:4248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4:03:41.479642 2026] [autoindex:error] [pid 3763142:tid 3763361] [client 66.70.198.128:36940] AH01276: Cannot serve directory /home/envasesb/public_html/productos/tarro-500-anillad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3:45:09.825654 2026] [autoindex:error] [pid 3758093:tid 3758360] [client 66.70.198.128:49710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sq-250-ml</text:p>
      <text:p text:style-name="Standard">[Fri Jul 03 13:45:09.821924 2026] [autoindex:error] [pid 3758089:tid 3758135] [client 66.70.198.128:49700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sq-250-ml</text:p>
      <text:p text:style-name="Standard">[Fri Jul 03 13:42:35.805199 2026] [autoindex:error] [pid 3758089:tid 3758141] [client 66.70.198.128:48658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yectos-a-tu-medida/productos-amenidades</text:p>
      <text:p text:style-name="Standard">[Fri Jul 03 13:24:08.118961 2026] [autoindex:error] [pid 3756123:tid 3756157] [client 66.70.198.128:49068] AH01276: Cannot serve directory /home/envasesb/public_html/productos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</text:p>
      <text:p text:style-name="Standard">[Fri Jul 03 13:21:00.418993 2026] [autoindex:error] [pid 3756123:tid 3756157] [client 66.70.198.128:39414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3:20:07.181144 2026] [autoindex:error] [pid 3756123:tid 3756159] [client 66.70.198.128:54530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3:17:04.795956 2026] [autoindex:error] [pid 3755934:tid 3755978] [client 66.70.198.128:49214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3:12:28.083032 2026] [autoindex:error] [pid 3757889:tid 3757923] [client 66.70.198.128:38818] AH01276: Cannot serve directory /home/envasesb/public_html/productos/tapa-vitrolero-r110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3:08:28.237902 2026] [autoindex:error] [pid 3757889:tid 3757941] [client 66.70.198.128:57372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sq-250-ml</text:p>
      <text:p text:style-name="Standard">[Fri Jul 03 13:08:28.237795 2026] [autoindex:error] [pid 3757889:tid 3757921] [client 66.70.198.128:5737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sq-250-ml</text:p>
      <text:p text:style-name="Standard">[Fri Jul 03 12:57:54.626594 2026] [autoindex:error] [pid 3757889:tid 3757942] [client 66.70.198.128:5513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5:50.083702 2026] [autoindex:error] [pid 3757889:tid 3757941] [client 66.70.198.128:48342] AH01276: Cannot serve directory /home/envasesb/public_html/productos/: No matching DirectoryIndex <text:soft-page-break/>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productos/sq-250-ml</text:p>
      <text:p text:style-name="Standard">[Fri Jul 03 12:55:22.785328 2026] [autoindex:error] [pid 3757889:tid 3757938] [client 66.70.198.128:46344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748323 2026] [autoindex:error] [pid 3757889:tid 3757934] [client 66.70.198.128:46332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697370 2026] [autoindex:error] [pid 3762252:tid 3762303] [client 66.70.198.128:46330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559076 2026] [autoindex:error] [pid 3757889:tid 3757926] [client 66.70.198.128:4631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465931 2026] [autoindex:error] [pid 3757889:tid 3757924] [client 66.70.198.128:46296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351922 2026] [autoindex:error] [pid 3755873:tid 3755913] [client 66.70.198.128:4629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313311 2026] [autoindex:error] [pid 3757889:tid 3757927] [client 66.70.198.128:46284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271099 2026] [autoindex:error] [pid 3757889:tid 3757921] [client 66.70.198.128:46274] AH01276: Cannot serve directory /home/envasesb/public_html/proyectos-a-tu-medida/: No matching DirectoryIndex <text:soft-page-break/>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2.159295 2026] [autoindex:error] [pid 3757889:tid 3757936] [client 66.70.198.128:4626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</text:p>
      <text:p text:style-name="Standard">[Fri Jul 03 12:55:20.531049 2026] [autoindex:error] [pid 3755873:tid 3755918] [client 66.70.198.128:46018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5:20.530582 2026] [autoindex:error] [pid 3755873:tid 3755928] [client 66.70.198.128:4600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4:52.830006 2026] [autoindex:error] [pid 3760897:tid 3760941] [client 66.70.198.128:55038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2:26.951164 2026] [autoindex:error] [pid 3762563:tid 3762610] [client 66.70.198.128:42038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2:26.739856 2026] [autoindex:error] [pid 3755873:tid 3755917] [client 66.70.198.128:42034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2:26.739290 2026] [autoindex:error] [pid 3762563:tid 3762607] [client 66.70.198.128:42022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2:26.727121 2026] [autoindex:error] [pid 3762252:tid 3762294] [client 66.70.198.128:42014] AH01276: Cannot serve directory /home/envasesb/public_html/contacto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</text:p>
      <text:p text:style-name="Standard">[Fri Jul 03 12:52:26.726355 2026] [autoindex:error] [pid 3762252:tid 3762295] [client 66.70.198.128:42012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41.279723 2026] [autoindex:error] [pid 3755873:tid 3755915] [client 66.70.198.128:47866] AH01276: Cannot serve directory /home/envasesb/public_html/product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41.279138 2026] [autoindex:error] [pid 3755873:tid 3755923] [client 66.70.198.128:47870] AH01276: Cannot serve directory /home/envasesb/public_html/contacto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29.995244 2026] [autoindex:error] [pid 3755873:tid 3755920] [client 66.70.198.128:58332] AH01276: Cannot serve directory /home/envasesb/public_html/legal/privacidad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29.759287 2026] [autoindex:error] [pid 3762252:tid 3762285] [client 66.70.198.128:58318] AH01276: Cannot serve directory /home/envasesb/public_html/proyectos-a-tu-medida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29.757445 2026] [autoindex:error] [pid 3760897:tid 3760936] [client 66.70.198.128:58308] AH01276: Cannot serve directory /home/envasesb/public_html/servici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29.757274 2026] [autoindex:error] [pid 3762252:tid 3762283] [client 66.70.198.128:58296] AH01276: Cannot serve directory /home/envasesb/public_html/blog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</text:p>
      <text:p text:style-name="Standard">[Fri Jul 03 12:51:29.729555 2026] [autoindex:error] [pid 3755873:tid 3755906] [client 66.70.198.128:58286] AH01276: Cannot serve directory /home/envasesb/public_html/contacto/: No matching DirectoryIndex (index.php,index.php8,index.php7,index.php5,index.perl,index.pl,index.plx,index.ppl,index.cgi,index.j<text:soft-page-break/>sp,index.jp,index.phtml,index.shtml,index.xhtml,index.html,index.htm,index.js) found, and server-generated directory index forbidden by Options directive, referer: https://www.envasesbh.mx/</text:p>
      <text:p text:style-name="Standard">[Fri Jul 03 12:51:29.589981 2026] [autoindex:error] [pid 3762252:tid 3762301] [client 66.70.198.128:58236] AH01276: Cannot serve directory /home/envasesb/public_html/quienes-somos/: No matching DirectoryIndex (index.php,index.php8,index.php7,index.php5,index.perl,index.pl,index.plx,index.ppl,index.cgi,index.jsp,index.jp,index.phtml,index.shtml,index.xhtml,index.html,index.htm,index.js) found, and server-generated directory index forbidden by Options directive, referer: https://www.envasesbh.mx/ <text:s text:c="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18:08:07.702364762</meta:creation-date>
    <dc:date>2026-07-03T18:09:03.504501808</dc:date>
    <meta:editing-duration>PT57S</meta:editing-duration>
    <meta:editing-cycles>1</meta:editing-cycles>
    <meta:document-statistic meta:table-count="0" meta:image-count="0" meta:object-count="0" meta:page-count="39" meta:paragraph-count="300" meta:word-count="9250" meta:character-count="153223" meta:non-whitespace-character-count="144253"/>
    <meta:generator>LibreOffice/24.2.7.2$Linux_X86_64 LibreOffice_project/420$Build-2</meta:generator>
  </office:meta>
</office:document-meta>
</file>