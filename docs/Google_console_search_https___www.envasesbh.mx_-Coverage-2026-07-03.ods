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10.44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05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Gráfico">
      <style:table-properties table:display="true" style:writing-mode="lr-tb"/>
    </style:style>
    <style:style style:name="ta2" style:family="table" style:master-page-name="PageStyle_5f_Problemas_20_críticos">
      <style:table-properties table:display="true" style:writing-mode="lr-tb"/>
    </style:style>
    <style:style style:name="ta3" style:family="table" style:master-page-name="PageStyle_5f_Problemas_20_no_20_críticos">
      <style:table-properties table:display="true" style:writing-mode="lr-tb"/>
    </style:style>
    <style:style style:name="ta4" style:family="table" style:master-page-name="PageStyle_5f_Metadato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áfico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Sin indexar</text:p>
          </table:table-cell>
          <table:table-cell office:value-type="string" calcext:value-type="string">
            <text:p>Indexadas</text:p>
          </table:table-cell>
          <table:table-cell office:value-type="string" calcext:value-type="string">
            <text:p>Impresion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4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380" calcext:value-type="float">
            <text:p>38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403" calcext:value-type="float">
            <text:p>4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6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420" calcext:value-type="float">
            <text:p>4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7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357" calcext:value-type="float">
            <text:p>3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8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305" calcext:value-type="float">
            <text:p>3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29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229" calcext:value-type="float">
            <text:p>22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30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228" calcext:value-type="float">
            <text:p>2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5-31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394" calcext:value-type="float">
            <text:p>3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1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393" calcext:value-type="float">
            <text:p>3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2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439" calcext:value-type="float">
            <text:p>43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3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402" calcext:value-type="float">
            <text:p>4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4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408" calcext:value-type="float">
            <text:p>4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5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226" calcext:value-type="float">
            <text:p>2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6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223" calcext:value-type="float">
            <text:p>2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7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455" calcext:value-type="float">
            <text:p>4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8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461" calcext:value-type="float">
            <text:p>4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09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448" calcext:value-type="float">
            <text:p>4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0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329" calcext:value-type="float">
            <text:p>32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1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351" calcext:value-type="float">
            <text:p>35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2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03" calcext:value-type="float">
            <text:p>2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3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4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456" calcext:value-type="float">
            <text:p>4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5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392" calcext:value-type="float">
            <text:p>3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6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418" calcext:value-type="float">
            <text:p>4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7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83" calcext:value-type="float">
            <text:p>2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8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19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0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1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65" calcext:value-type="float">
            <text:p>26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2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43" calcext:value-type="float">
            <text:p>2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3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38" calcext:value-type="float">
            <text:p>2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4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92" calcext:value-type="float">
            <text:p>1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5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6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7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8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19" calcext:value-type="float">
            <text:p>2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6-06-29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16380"/>
        </table:table-row>
      </table:table>
      <table:table table:name="Problemas críticos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Validación</text:p>
          </table:table-cell>
          <table:table-cell office:value-type="string" calcext:value-type="string">
            <text:p>Págin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 ha bloqueado debido a que el acceso no está permitido (403)</text:p>
          </table:table-cell>
          <table:table-cell office:value-type="string" calcext:value-type="string">
            <text:p>Sitio web</text:p>
          </table:table-cell>
          <table:table-cell office:value-type="string" calcext:value-type="string">
            <text:p>No iniciada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ágina alternativa con etiqueta canónica adecuada</text:p>
          </table:table-cell>
          <table:table-cell office:value-type="string" calcext:value-type="string">
            <text:p>Sitio web</text:p>
          </table:table-cell>
          <table:table-cell office:value-type="string" calcext:value-type="string">
            <text:p>No iniciada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ubierta: actualmente sin indexar</text:p>
          </table:table-cell>
          <table:table-cell office:value-type="string" calcext:value-type="string">
            <text:p>Sistemas de Google</text:p>
          </table:table-cell>
          <table:table-cell office:value-type="string" calcext:value-type="string">
            <text:p>No iniciada</text:p>
          </table:table-cell>
          <table:table-cell office:value-type="float" office:value="73" calcext:value-type="float">
            <text:p>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streada: actualmente sin indexar</text:p>
          </table:table-cell>
          <table:table-cell office:value-type="string" calcext:value-type="string">
            <text:p>Sistemas de Google</text:p>
          </table:table-cell>
          <table:table-cell office:value-type="string" calcext:value-type="string">
            <text:p>No iniciada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</table:table>
      <table:table table:name="Problemas no críticos" table:style-name="ta3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Validación</text:p>
          </table:table-cell>
          <table:table-cell office:value-type="string" calcext:value-type="string">
            <text:p>Páginas</text:p>
          </table:table-cell>
          <table:table-cell table:number-columns-repeated="16380"/>
        </table:table-row>
      </table:table>
      <table:table table:name="Metadatos" table:style-name="ta4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Propiedad</text:p>
          </table:table-cell>
          <table:table-cell office:value-type="string" calcext:value-type="string">
            <text:p>Valo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emap</text:p>
          </table:table-cell>
          <table:table-cell office:value-type="string" calcext:value-type="string">
            <text:p>Todas las páginas conocidas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 loext:blank-width-char="("> </number:text>
      <number:fill-character> </number:fill-character>
      <number:text loext:blank-width-char=")1">-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26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text loext:blank-width-char="("> </number:text>
      <number:currency-symbol/>
      <number:text> </number:text>
      <number:fill-character> </number:fill-character>
      <number:text loext:blank-width-char=")1">- </number:text>
    </number:currency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28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28">
      <number:text loext:blank-width-char="("> </number:text>
      <number:text-content/>
      <number:text loext:blank-width-char=")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blemas_20_no_20_críticos" style:display-name="PageStyle_Problemas no crític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áfico" style:display-name="PageStyle_Gráfic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os" style:display-name="PageStyle_Metada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blemas_20_críticos" style:display-name="PageStyle_Problemas crític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3T22:47:23</meta:creation-date>
    <meta:initial-creator>Apache POI</meta:initial-creator>
    <meta:generator>LibreOffice/24.2.7.2$Linux_X86_64 LibreOffice_project/420$Build-2</meta:generator>
    <dc:date>2026-07-03T17:48:58.227020689</dc:date>
    <meta:editing-duration>PT1M18S</meta:editing-duration>
    <meta:editing-cycles>1</meta:editing-cycles>
    <meta:document-statistic meta:table-count="4" meta:cell-count="182" meta:object-count="0"/>
  </office:meta>
</office:document-meta>
</file>